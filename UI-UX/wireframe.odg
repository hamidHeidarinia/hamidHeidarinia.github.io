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2" style:family="graphic" style:parent-style-name="standard">
      <style:graphic-properties svg:stroke-color="#fafafa" draw:fill-color="#ffffff" draw:textarea-horizontal-align="justify" draw:textarea-vertical-align="middle" draw:auto-grow-height="false" fo:min-height="7.206cm" fo:min-width="14.576cm" loext:glow-radius="0.035cm" loext:glow-transparency="43%" loext:softedge-radius="0.03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7cm" fo:min-width="16.4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0" style:family="graphic" style:parent-style-name="objectwithoutfill">
      <style:graphic-properties svg:stroke-color="#bdbdbd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0.134cm" loext:softedge-radius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0.035cm" loext:softedge-radius="0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7.999cm"/>
      <style:paragraph-properties style:writing-mode="lr-tb"/>
    </style:style>
    <style:style style:name="gr14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0.649cm" fo:min-width="3.956cm" loext:glow-radius="0cm" loext:softedge-radius="0cm"/>
    </style:style>
    <style:style style:name="gr15" style:family="graphic" style:parent-style-name="standard">
      <style:graphic-properties draw:stroke="none" svg:stroke-color="#000000" draw:fill="none" draw:fill-color="#ffffff" fo:min-height="1.13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2.004cm" fo:wrap-option="no-wrap" loext:softedge-radius="0cm"/>
      <style:paragraph-properties style:writing-mode="lr-tb"/>
    </style:style>
    <style:style style:name="gr17" style:family="graphic" style:parent-style-name="standard">
      <style:graphic-properties svg:stroke-color="#fafafa" draw:fill-color="#ffffff" draw:textarea-horizontal-align="justify" draw:textarea-vertical-align="middle" draw:auto-grow-height="false" fo:min-height="12.507cm" fo:min-width="18.325cm" loext:glow-radius="0.035cm" loext:glow-transparency="6%" loext:softedge-radius="0.03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774cm" fo:min-width="18.212cm" loext:softedge-radius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2.6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149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48cm" fo:min-width="5.796cm" loext:softedge-radius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8.64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2.194cm" loext:softedge-radius="0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1.745cm" loext:softedge-radius="0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53.09cm" fo:min-width="0.453cm" loext:softedge-radius="0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0.863cm" fo:min-width="0.135cm" loext:softedge-radius="0cm"/>
    </style:style>
    <style:style style:name="gr30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405cm" loext:softedge-radius="0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 loext:softedge-radius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.3cm" fo:margin-bottom="0.3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Vazirmatn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-color="#ffffff" draw:opacity="70%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Vazirmatn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Vazirmatn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Vazirmat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Vazirmatn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4.128cm" svg:x="1.952cm" svg:y="15.604cm">
          <draw:text-box>
            <text:p>About</text:p>
            <text:p>Lorem ipsum, dolor sit amet consectetur adipisicing elit. Distinctio quas dolorem animi praesentium. Dignissimos magnam illo eligendi dolore placeat architecto! Reprehenderit non earum cumque, nobis ut in enim architecto</text:p>
          </draw:text-box>
        </draw:frame>
        <draw:custom-shape draw:style-name="gr2" draw:text-style-name="P2" draw:layer="layout" svg:width="15.24cm" svg:height="7.62cm" svg:x="25.129cm" svg:y="19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5.64843973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7.145cm" svg:height="2.223cm" svg:x="1.952cm" svg:y="20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23cm" svg:height="1.27cm" svg:x="2.269cm" svg:y="20.684cm">
          <draw:text-box>
            <text:p>icon</text:p>
          </draw:text-box>
        </draw:frame>
        <draw:frame draw:style-name="gr5" draw:text-style-name="P1" draw:layer="layout" svg:width="11.113cm" svg:height="1.673cm" svg:x="4.174cm" svg:y="20.367cm">
          <draw:text-box>
            <text:p><text:span text:style-name="T1">Top skils</text:span></text:p>
            <text:p>Skil_1, (3)</text:p>
          </draw:text-box>
        </draw:frame>
        <draw:frame draw:style-name="gr6" draw:text-style-name="P1" draw:layer="layout" svg:width="1.588cm" svg:height="1.651cm" svg:x="16.874cm" svg:y="20.367cm">
          <draw:text-box>
            <text:p><text:span text:style-name="T2">→</text:span></text:p>
          </draw:text-box>
        </draw:frame>
        <draw:line draw:style-name="gr7" draw:text-style-name="P4" draw:layer="layout" svg:x1="25.446cm" svg:y1="21.04cm" svg:x2="40.051cm" svg:y2="21.002cm">
          <text:p/>
        </draw:line>
        <draw:frame draw:style-name="gr8" draw:text-style-name="P6" draw:layer="layout" svg:width="14.287cm" svg:height="1.673cm" svg:x="25.764cm" svg:y="19.532cm">
          <draw:text-box>
            <text:p text:style-name="P5">Name’s top skills<text:tab/><text:tab/><text:tab/> <text:s text:c="23"/><text:tab/>X</text:p>
          </draw:text-box>
        </draw:frame>
        <draw:frame draw:style-name="gr9" draw:text-style-name="P7" draw:layer="layout" svg:width="13.652cm" svg:height="1.905cm" svg:x="25.764cm" svg:y="21.637cm">
          <draw:text-box>
            <text:p><text:span text:style-name="T1">Skill 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˄</text:span></text:p>
            <text:p><text:span text:style-name="T3">company name</text:span></text:p>
          </draw:text-box>
        </draw:frame>
        <draw:line draw:style-name="gr10" draw:text-style-name="P4" draw:layer="layout" svg:x1="25.764cm" svg:y1="23.859cm" svg:x2="39.099cm" svg:y2="23.859cm">
          <text:p/>
        </draw:line>
        <draw:custom-shape draw:style-name="gr11" draw:text-style-name="P2" draw:layer="layout" svg:width="0.634cm" svg:height="4.445cm" svg:x="39.416cm" svg:y="21.3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35cm" svg:height="2.54cm" svg:x="39.473cm" svg:y="21.43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952cm" svg:y1="23.224cm" svg:x2="20.049cm" svg:y2="23.224cm">
          <text:p/>
        </draw:line>
        <draw:frame draw:style-name="gr4" draw:text-style-name="P1" draw:layer="layout" svg:width="7.303cm" svg:height="1.27cm" svg:x="2.269cm" svg:y="23.859cm">
          <draw:text-box>
            <text:p>Experience</text:p>
          </draw:text-box>
        </draw:frame>
        <draw:frame draw:style-name="gr4" draw:text-style-name="P1" draw:layer="layout" svg:width="1.905cm" svg:height="1.27cm" svg:x="2.587cm" svg:y="25.447cm">
          <draw:text-box>
            <text:p>icon</text:p>
          </draw:text-box>
        </draw:frame>
        <draw:frame draw:style-name="gr13" draw:text-style-name="P11" draw:layer="layout" svg:width="15.557cm" svg:height="8.249cm" svg:x="4.492cm" svg:y="25.447cm">
          <draw:text-box>
            <text:p text:style-name="P9"><text:span text:style-name="T4">Job title</text:span></text:p>
            <text:p text:style-name="P9"><text:span text:style-name="T5">Company name</text:span></text:p>
            <text:p text:style-name="P9"><text:span text:style-name="T6">Date</text:span></text:p>
            <text:p text:style-name="P9"><text:span text:style-name="T6">Location name</text:span></text:p>
            <text:p text:style-name="P10"><text:span text:style-name="T5">Lorem ipsum, dolor </text:span><text:span text:style-name="T5">sit amet consectetur </text:span><text:span text:style-name="T5">adipisicing elit. </text:span><text:span text:style-name="T5">Distinctio quas </text:span><text:span text:style-name="T5">dolorem animi </text:span><text:span text:style-name="T5">praesentium. </text:span><text:span text:style-name="T5">Dignissimos magnam </text:span><text:span text:style-name="T5">illo eligendi dolore </text:span><text:span text:style-name="T5">placeat architecto! </text:span><text:span text:style-name="T5">Reprehenderit non </text:span><text:span text:style-name="T5">earum cumque, nobis </text:span><text:span text:style-name="T5">ut in enim architecto </text:span><text:span text:style-name="T5">….</text:span></text:p>
            <text:p text:style-name="P10"><text:span text:style-name="T5"/></text:p>
          </draw:text-box>
        </draw:frame>
        <draw:custom-shape draw:style-name="gr14" draw:text-style-name="P12" draw:layer="layout" svg:width="4.828cm" svg:height="1.271cm" svg:x="4.546cm" svg:y="33.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5.079cm" svg:height="1.388cm" svg:x="4.494cm" svg:y="33.952cm">
          <draw:text-box>
            <text:p>Show more <text:s text:c="4"/>˅</text:p>
          </draw:text-box>
        </draw:frame>
        <draw:custom-shape draw:style-name="gr16" draw:text-style-name="P14" draw:layer="layout" svg:width="3.556cm" svg:height="2.222cm" svg:x="23.86cm" svg:y="32.432cm">
          <text:p text:style-name="P13"><text:s/>collapse</text:p>
          <draw:enhanced-geometry svg:viewBox="0 0 21600 21600" draw:glue-points="10800 0 3160 3160 0 10800 3160 18440 10800 21600 18440 18440 21600 10800 18440 3160 ?f14 ?f15" draw:text-areas="3200 3200 18400 18400" draw:type="round-callout" draw:modifiers="-82835.4231093618 21978.94736842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0" draw:text-style-name="P4" draw:layer="layout" svg:x1="2.27cm" svg:y1="36.242cm" svg:x2="20.367cm" svg:y2="36.242cm">
          <text:p/>
        </draw:line>
        <draw:frame draw:style-name="gr4" draw:text-style-name="P1" draw:layer="layout" svg:width="12.7cm" svg:height="1.27cm" svg:x="26.082cm" svg:y="24.494cm">
          <draw:text-box>
            <text:p>The first 3-4 top skills, the rest in any order.</text:p>
          </draw:text-box>
        </draw:frame>
        <draw:custom-shape draw:style-name="gr17" draw:text-style-name="P2" draw:layer="layout" svg:width="19.085cm" svg:height="13.017cm" svg:x="1.6cm" svg:y="1.635cm">
          <text:p/>
          <draw:enhanced-geometry svg:viewBox="0 0 21600 21600" draw:path-stretchpoint-x="10800" draw:path-stretchpoint-y="10800" draw:text-areas="?f3 ?f4 ?f5 ?f6" draw:type="round-rectangle" draw:modifiers="741.6807497311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9.05cm" svg:height="5.362cm" svg:x="1.635cm" svg:y="1.57cm">
          <text:p text:style-name="P15">Header img</text:p>
          <draw:enhanced-geometry svg:viewBox="0 0 21600 21600" draw:path-stretchpoint-x="10800" draw:path-stretchpoint-y="10800" draw:text-areas="?f3 ?f4 ?f5 ?f6" draw:type="round-rectangle" draw:modifiers="2336.84210526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draw:layer="layout" svg:width="6.667cm" svg:height="2.858cm" svg:x="2.27cm" svg:y="8.937cm">
          <draw:text-box>
            <text:p text:style-name="P5"><text:span text:style-name="T7">Full name</text:span></text:p>
            <text:p text:style-name="P5">Job title</text:p>
            <text:p text:style-name="P5">Country location</text:p>
          </draw:text-box>
        </draw:frame>
        <draw:frame draw:style-name="gr20" draw:text-style-name="P17" draw:layer="layout" svg:width="6.668cm" svg:height="2.222cm" svg:x="10.207cm" svg:y="9.255cm">
          <draw:text-box>
            <text:p/>
          </draw:text-box>
        </draw:frame>
        <draw:frame draw:style-name="gr21" draw:text-style-name="P19" draw:layer="layout" svg:width="10.796cm" svg:height="3.399cm" svg:x="9.571cm" svg:y="8.937cm">
          <draw:text-box>
            <text:p text:style-name="P18"><text:span text:style-name="T8">Icon <text:s/></text:span><text:span text:style-name="T9">Compa</text:span><text:span text:style-name="T9">ny </text:span><text:span text:style-name="T9">name</text:span></text:p>
            <text:p text:style-name="P18"><text:span text:style-name="T8">Icon </text:span><text:span text:style-name="T9">Latest </text:span><text:span text:style-name="T9">acade</text:span><text:span text:style-name="T9">mic </text:span><text:span text:style-name="T9">degree</text:span></text:p>
            <text:p text:style-name="P18"><text:span text:style-name="T8">Icon </text:span><text:span text:style-name="T9">Github </text:span><text:span text:style-name="T9">page / </text:span><text:span text:style-name="T9">domain</text:span></text:p>
          </draw:text-box>
        </draw:frame>
        <draw:custom-shape draw:style-name="gr22" draw:text-style-name="P21" draw:layer="layout" svg:width="6.668cm" svg:height="1.27cm" svg:x="2.587cm" svg:y="12.747cm">
          <text:p text:style-name="P20"><text:span text:style-name="T10">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7" draw:layer="layout" svg:width="5.397cm" svg:height="1.27cm" svg:x="2.27cm" svg:y="37.195cm">
          <draw:text-box>
            <text:p>Education</text:p>
          </draw:text-box>
        </draw:frame>
        <draw:frame draw:style-name="gr23" draw:text-style-name="P17" draw:layer="layout" svg:width="3.175cm" svg:height="1.587cm" svg:x="2.587cm" svg:y="39.1cm">
          <draw:text-box>
            <text:p><text:span text:style-name="T11">ic</text:span><text:span text:style-name="T11">on</text:span></text:p>
          </draw:text-box>
        </draw:frame>
        <draw:frame draw:style-name="gr24" draw:text-style-name="P17" draw:layer="layout" svg:width="10.795cm" svg:height="3.493cm" svg:x="7.032cm" svg:y="38.782cm">
          <draw:text-box>
            <text:p text:style-name="P5"><text:span text:style-name="T9">aca</text:span><text:span text:style-name="T9">dem</text:span><text:span text:style-name="T9">ic </text:span><text:span text:style-name="T9">deg</text:span><text:span text:style-name="T9">ree</text:span></text:p>
            <text:p text:style-name="P5"><text:span text:style-name="T9">Deg</text:span><text:span text:style-name="T9">ree </text:span><text:span text:style-name="T9">-</text:span><text:span text:style-name="T9">Title </text:span><text:span text:style-name="T9">of</text:span></text:p>
            <text:p text:style-name="P5"><text:span text:style-name="T9"><text:s/></text:span><text:span text:style-name="T9">Yea</text:span><text:span text:style-name="T9">r - </text:span><text:span text:style-name="T9">year</text:span></text:p>
          </draw:text-box>
        </draw:frame>
        <draw:line draw:style-name="gr10" draw:text-style-name="P4" draw:layer="layout" svg:x1="2.271cm" svg:y1="42.542cm" svg:x2="20.368cm" svg:y2="42.542cm">
          <text:p/>
        </draw:line>
        <draw:frame draw:style-name="gr9" draw:text-style-name="P17" draw:layer="layout" svg:width="6.35cm" svg:height="1.905cm" svg:x="2.587cm" svg:y="43.227cm">
          <draw:text-box>
            <text:p>Languages</text:p>
          </draw:text-box>
        </draw:frame>
        <draw:frame draw:style-name="gr25" draw:text-style-name="P17" draw:layer="layout" svg:width="16.51cm" svg:height="8.89cm" svg:x="2.587cm" svg:y="44.497cm">
          <draw:text-box>
            <text:p>Azerbaijan</text:p>
            <text:p>Native or bilingual proficiency</text:p>
            <text:p/>
            <text:p>Persian</text:p>
            <text:p>Native or bilingual proficiency</text:p>
            <text:p/>
            <text:p>English</text:p>
            <text:p>Elementary proficiency</text:p>
            <text:p/>
            <text:p>Turkish</text:p>
            <text:p>Elementary proficiency</text:p>
          </draw:text-box>
        </draw:frame>
        <draw:line draw:style-name="gr7" draw:text-style-name="P4" draw:layer="layout" svg:x1="20.367cm" svg:y1="1.952cm" svg:x2="1.952cm" svg:y2="6.715cm">
          <text:p/>
        </draw:line>
        <draw:line draw:style-name="gr7" draw:text-style-name="P4" draw:layer="layout" svg:x1="1.635cm" svg:y1="1.952cm" svg:x2="20.367cm" svg:y2="6.715cm">
          <text:p/>
        </draw:line>
        <draw:custom-shape draw:style-name="gr26" draw:text-style-name="P2" draw:layer="layout" svg:width="3.81cm" svg:height="3.81cm" svg:x="2.2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3.175cm" svg:height="3.175cm" svg:x="2.587cm" svg:y="5.144cm">
          <text:p text:style-name="P15">Profile</text:p>
          <text:p text:style-name="P15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127cm" svg:y1="5.762cm" svg:x2="3.222cm" svg:y2="7.667cm">
          <text:p/>
        </draw:line>
        <draw:line draw:style-name="gr7" draw:text-style-name="P4" draw:layer="layout" svg:x1="2.905cm" svg:y1="5.762cm" svg:x2="5.127cm" svg:y2="7.667cm">
          <text:p/>
        </draw:line>
        <draw:custom-shape draw:style-name="gr28" draw:text-style-name="P2" draw:layer="layout" svg:width="0.953cm" svg:height="53.34cm" svg:x="21.002cm" svg:y="1.6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635cm" svg:height="11.113cm" svg:x="21.14cm" svg:y="1.952cm">
          <text:p/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19.732cm" svg:y1="21.32cm" svg:x2="24.495cm" svg:y2="21.32cm">
          <text:p text:style-name="P15">MODAL</text:p>
        </draw:line>
        <draw:custom-shape draw:style-name="gr31" draw:text-style-name="P2" draw:layer="layout" svg:width="1.905cm" svg:height="0.635cm" svg:x="16.24cm" svg:y="13.382cm">
          <text:p text:style-name="P15">EN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635cm" svg:height="0.635cm" svg:x="18.145cm" svg:y="13.382cm">
          <text:p text:style-name="P22">˅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Vazirmatn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7-19T18:03:08.569287875</meta:creation-date>
    <dc:date>2026-07-20T22:16:20.529303859</dc:date>
    <meta:editing-duration>PT33M33S</meta:editing-duration>
    <meta:editing-cycles>11</meta:editing-cycles>
    <meta:generator>LibreOffice/7.1.4.2$Linux_X86_64 LibreOffice_project/a529a4fab45b75fefc5b6226684193eb000654f6</meta:generator>
    <meta:document-statistic meta:object-count="44"/>
  </office:meta>
</office:document-meta>
</file>