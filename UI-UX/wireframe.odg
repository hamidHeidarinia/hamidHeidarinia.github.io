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Vazirmatn" svg:font-family="Vazirmatn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color="#000000" draw:fill="none" draw:fill-color="#ffffff" fo:min-height="3.878cm"/>
      <style:paragraph-properties style:writing-mode="lr-tb"/>
    </style:style>
    <style:style style:name="gr2" style:family="graphic" style:parent-style-name="standard">
      <style:graphic-properties svg:stroke-color="#fafafa" draw:fill-color="#ffffff" draw:textarea-horizontal-align="justify" draw:textarea-vertical-align="middle" draw:auto-grow-height="false" fo:min-height="7.206cm" fo:min-width="14.576cm" loext:glow-radius="0.035cm" loext:glow-transparency="43%" loext:softedge-radius="0.03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757cm" fo:min-width="16.42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401cm"/>
      <style:paragraph-properties style:writing-mode="lr-tb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standard" style:list-style-name="L1">
      <style:graphic-properties draw:stroke="none" svg:stroke-color="#000000" draw:fill="none" draw:fill-color="#ffffff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10" style:family="graphic" style:parent-style-name="objectwithoutfill">
      <style:graphic-properties svg:stroke-color="#bdbdbd" draw:fill="none" draw:textarea-vertical-align="middle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4.195cm" fo:min-width="0.134cm" loext:softedge-radius="0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2.29cm" fo:min-width="0.035cm" loext:softedge-radius="0cm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7.999cm"/>
      <style:paragraph-properties style:writing-mode="lr-tb"/>
    </style:style>
    <style:style style:name="gr14" style:family="graphic" style:parent-style-name="standard">
      <style:graphic-properties svg:stroke-color="#000000" draw:fill-color="#ffffff" draw:opacity="70%" draw:textarea-horizontal-align="justify" draw:textarea-vertical-align="middle" draw:auto-grow-height="false" fo:min-height="0.649cm" fo:min-width="3.956cm" loext:glow-radius="0cm" loext:softedge-radius="0cm"/>
    </style:style>
    <style:style style:name="gr15" style:family="graphic" style:parent-style-name="standard">
      <style:graphic-properties draw:stroke="none" svg:stroke-color="#000000" draw:fill="none" draw:fill-color="#ffffff" fo:min-height="1.138cm"/>
      <style:paragraph-properties style:writing-mode="lr-tb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.314cm" fo:min-width="2.004cm" fo:wrap-option="no-wrap" loext:softedge-radius="0cm"/>
      <style:paragraph-properties style:writing-mode="lr-tb"/>
    </style:style>
    <style:style style:name="gr17" style:family="graphic" style:parent-style-name="standard">
      <style:graphic-properties svg:stroke-color="#fafafa" draw:fill-color="#ffffff" draw:textarea-horizontal-align="justify" draw:textarea-vertical-align="middle" draw:auto-grow-height="false" fo:min-height="12.507cm" fo:min-width="18.325cm" loext:glow-radius="0.035cm" loext:glow-transparency="6%" loext:softedge-radius="0.035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4.774cm" fo:min-width="18.212cm" loext:softedge-radius="0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2.60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972cm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3.149cm"/>
      <style:paragraph-properties style:writing-mode="lr-tb"/>
    </style:style>
    <style:style style:name="gr2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648cm" fo:min-width="5.796cm" loext:softedge-radius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1.33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3.24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8.64cm"/>
      <style:paragraph-properties style:writing-mode="lr-tb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2.444cm" fo:min-width="2.194cm" loext:softedge-radius="0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1.995cm" fo:min-width="1.745cm" loext:softedge-radius="0cm"/>
      <style:paragraph-properties style:writing-mode="lr-tb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53.09cm" fo:min-width="0.453cm" loext:softedge-radius="0cm"/>
    </style:style>
    <style:style style:name="gr29" style:family="graphic" style:parent-style-name="standard">
      <style:graphic-properties svg:stroke-color="#000000" draw:fill-color="#000000" draw:textarea-horizontal-align="justify" draw:textarea-vertical-align="middle" draw:auto-grow-height="false" fo:min-height="10.863cm" fo:min-width="0.135cm" loext:softedge-radius="0cm"/>
    </style:style>
    <style:style style:name="gr30" style:family="graphic" style:parent-style-name="objectwithoutfill">
      <style:graphic-properties draw:stroke="dash" draw:stroke-dash="Double_20_Dash" svg:stroke-color="#bdbdbd" draw:marker-end="Arrowheads_20_1" draw:marker-end-width="0.3cm" draw:fill="none" draw:textarea-vertical-align="middle"/>
      <style:paragraph-properties style:writing-mode="lr-tb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1.405cm" loext:softedge-radius="0cm"/>
      <style:paragraph-properties style:writing-mode="lr-tb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0.135cm" loext:softedge-radius="0cm"/>
      <style:paragraph-properties style:writing-mode="lr-tb"/>
    </style:style>
    <style:style style:name="gr33" style:family="graphic" style:parent-style-name="objectwithoutfill">
      <style:graphic-properties draw:stroke="dash" draw:stroke-dash="Double_20_Dash" svg:stroke-color="#bdbdbd" draw:marker-end="Arrowheads_20_2" draw:marker-end-width="0.3cm" draw:fill="none" draw:textarea-vertical-align="middle"/>
    </style:style>
    <style:style style:name="gr34" style:family="graphic" style:parent-style-name="objectwithoutfill">
      <style:graphic-properties draw:stroke="dash" draw:stroke-dash="Double_20_Dash" svg:stroke-color="#bdbdbd" draw:marker-end="Arrowheads_20_4" draw:marker-end-width="0.3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36" style:family="graphic" style:parent-style-name="standard">
      <style:graphic-properties svg:stroke-color="#fafafa" draw:fill-color="#ffffff" draw:textarea-horizontal-align="justify" draw:textarea-vertical-align="middle" draw:auto-grow-height="false" fo:min-height="7.206cm" fo:min-width="12.353cm" loext:glow-radius="0.035cm" loext:glow-transparency="43%" loext:softedge-radius="0.035cm"/>
    </style:style>
    <style:style style:name="gr37" style:family="graphic" style:parent-style-name="standard" style:list-style-name="L1">
      <style:graphic-properties draw:stroke="none" svg:stroke-color="#000000" draw:fill="none" draw:fill-color="#ffffff" fo:min-height="1.423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4.19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start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style:paragraph-properties fo:margin-left="0cm" fo:margin-right="0cm" fo:margin-top="0.3cm" fo:margin-bottom="0.3cm" fo:line-height="100%" fo:text-indent="0cm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.3cm" fo:margin-bottom="0.3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Vazirmatn" style:font-size-complex="18pt" style:font-style-complex="normal" style:font-weight-complex="bold" style:text-emphasize="none" style:font-relief="none" style:text-overline-style="none" style:text-overline-color="font-color"/>
    </style:style>
    <style:style style:name="P12" style:family="paragraph">
      <loext:graphic-properties draw:fill-color="#ffffff" draw:opacity="70%"/>
      <style:paragraph-properties fo:text-align="center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-color="#ffffff"/>
      <style:paragraph-properties fo:text-align="center" style:writing-mode="lr-tb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weight="normal" style:font-weight-asian="normal" style:font-weight-complex="normal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/>
    </style:style>
    <style:style style:name="P17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/>
    </style:style>
    <style:style style:name="P18" style:family="paragraph">
      <style:paragraph-properties fo:text-align="center"/>
      <style:text-properties fo:color="#bdbdbd" loext:opacity="100%"/>
    </style:style>
    <style:style style:name="P19" style:family="paragraph">
      <loext:graphic-properties draw:fill="none"/>
      <style:paragraph-properties fo:text-align="center" style:writing-mode="lr-tb"/>
      <style:text-properties fo:color="#bdbdbd" loext:opacity="100%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1" style:family="paragraph">
      <style:text-properties fo:color="#bdbdbd" loext:opacity="100%"/>
    </style:style>
    <style:style style:name="P22" style:family="paragraph">
      <loext:graphic-properties draw:fill="none" draw:fill-color="#ffffff"/>
      <style:text-properties fo:color="#bdbdbd" loext:opacity="100%"/>
    </style:style>
    <style:style style:name="P23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Vazirmatn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Vazirmatn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Vazirmatn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Vazirmatn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color="#000000" loext:opacity="100%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color="#bdbdbd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097cm" svg:height="4.128cm" svg:x="1.952cm" svg:y="15.604cm">
          <draw:text-box>
            <text:p>About</text:p>
            <text:p>Lorem ipsum, dolor sit amet consectetur adipisicing elit. Distinctio quas dolorem animi praesentium. Dignissimos magnam illo eligendi dolore placeat architecto! Reprehenderit non earum cumque, nobis ut in enim architecto</text:p>
          </draw:text-box>
        </draw:frame>
        <draw:custom-shape draw:style-name="gr2" draw:text-style-name="P2" draw:layer="layout" svg:width="15.24cm" svg:height="7.62cm" svg:x="25.129cm" svg:y="19.0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95.6484397366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7.145cm" svg:height="2.223cm" svg:x="1.952cm" svg:y="20.0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2.223cm" svg:height="1.27cm" svg:x="2.269cm" svg:y="20.684cm">
          <draw:text-box>
            <text:p>icon</text:p>
          </draw:text-box>
        </draw:frame>
        <draw:frame draw:style-name="gr5" draw:text-style-name="P1" draw:layer="layout" svg:width="11.113cm" svg:height="1.673cm" svg:x="4.174cm" svg:y="20.367cm">
          <draw:text-box>
            <text:p><text:span text:style-name="T1">Top skils</text:span></text:p>
            <text:p>Skil_1, (3)</text:p>
          </draw:text-box>
        </draw:frame>
        <draw:frame draw:style-name="gr6" draw:text-style-name="P1" draw:layer="layout" svg:width="1.588cm" svg:height="1.651cm" svg:x="16.874cm" svg:y="20.367cm">
          <draw:text-box>
            <text:p><text:span text:style-name="T2">→</text:span></text:p>
          </draw:text-box>
        </draw:frame>
        <draw:line draw:style-name="gr7" draw:text-style-name="P4" draw:layer="layout" svg:x1="25.446cm" svg:y1="21.04cm" svg:x2="40.051cm" svg:y2="21.002cm">
          <text:p/>
        </draw:line>
        <draw:frame draw:style-name="gr8" draw:text-style-name="P6" draw:layer="layout" svg:width="14.287cm" svg:height="1.673cm" svg:x="25.764cm" svg:y="19.532cm">
          <draw:text-box>
            <text:p text:style-name="P5">Name’s top skills<text:tab/><text:tab/><text:tab/> <text:s text:c="23"/><text:tab/>X</text:p>
          </draw:text-box>
        </draw:frame>
        <draw:frame draw:style-name="gr9" draw:text-style-name="P7" draw:layer="layout" svg:width="13.652cm" svg:height="1.905cm" svg:x="25.764cm" svg:y="21.637cm">
          <draw:text-box>
            <text:p><text:span text:style-name="T1">Skill nam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˄</text:span></text:p>
            <text:p><text:span text:style-name="T3">company name</text:span></text:p>
          </draw:text-box>
        </draw:frame>
        <draw:line draw:style-name="gr10" draw:text-style-name="P4" draw:layer="layout" svg:x1="25.764cm" svg:y1="23.859cm" svg:x2="39.099cm" svg:y2="23.859cm">
          <text:p/>
        </draw:line>
        <draw:custom-shape draw:style-name="gr11" draw:text-style-name="P2" draw:layer="layout" svg:width="0.634cm" svg:height="4.445cm" svg:x="39.416cm" svg:y="21.31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35cm" svg:height="2.54cm" svg:x="39.473cm" svg:y="21.437cm">
          <text:p/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1.952cm" svg:y1="23.224cm" svg:x2="20.049cm" svg:y2="23.224cm">
          <text:p/>
        </draw:line>
        <draw:frame draw:style-name="gr4" draw:text-style-name="P1" draw:layer="layout" svg:width="7.303cm" svg:height="1.27cm" svg:x="2.269cm" svg:y="23.859cm">
          <draw:text-box>
            <text:p>Experience</text:p>
          </draw:text-box>
        </draw:frame>
        <draw:frame draw:style-name="gr4" draw:text-style-name="P1" draw:layer="layout" svg:width="1.905cm" svg:height="1.27cm" svg:x="2.587cm" svg:y="25.447cm">
          <draw:text-box>
            <text:p>icon</text:p>
          </draw:text-box>
        </draw:frame>
        <draw:frame draw:style-name="gr13" draw:text-style-name="P11" draw:layer="layout" svg:width="15.557cm" svg:height="8.249cm" svg:x="4.492cm" svg:y="25.447cm">
          <draw:text-box>
            <text:p text:style-name="P9"><text:span text:style-name="T4">Job title</text:span></text:p>
            <text:p text:style-name="P9"><text:span text:style-name="T5">Company name</text:span></text:p>
            <text:p text:style-name="P9"><text:span text:style-name="T6">Date</text:span></text:p>
            <text:p text:style-name="P9"><text:span text:style-name="T6">Location name</text:span></text:p>
            <text:p text:style-name="P10"><text:span text:style-name="T5">Lorem ipsum, dolor sit amet consectetur adipisicing elit. Distinctio quas dolorem animi praesentium. Dignissimos magnam illo eligendi dolore placeat architecto! Reprehenderit non earum cumque, nobis ut in enim architecto ….</text:span></text:p>
            <text:p text:style-name="P10"><text:span text:style-name="T5"/></text:p>
          </draw:text-box>
        </draw:frame>
        <draw:custom-shape draw:style-name="gr14" draw:text-style-name="P12" draw:layer="layout" svg:width="4.828cm" svg:height="1.271cm" svg:x="4.546cm" svg:y="33.8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" draw:layer="layout" svg:width="5.079cm" svg:height="1.388cm" svg:x="4.494cm" svg:y="33.952cm">
          <draw:text-box>
            <text:p>Show more <text:s text:c="4"/>˅</text:p>
          </draw:text-box>
        </draw:frame>
        <draw:custom-shape draw:style-name="gr16" draw:text-style-name="P14" draw:layer="layout" svg:width="3.556cm" svg:height="2.222cm" svg:x="23.86cm" svg:y="32.432cm">
          <text:p text:style-name="P13"><text:s/>collapse</text:p>
          <draw:enhanced-geometry svg:viewBox="0 0 21600 21600" draw:glue-points="10800 0 3160 3160 0 10800 3160 18440 10800 21600 18440 18440 21600 10800 18440 3160 ?f14 ?f15" draw:text-areas="3200 3200 18400 18400" draw:type="round-callout" draw:modifiers="-82835.4231093618 21978.947368421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line draw:style-name="gr10" draw:text-style-name="P4" draw:layer="layout" svg:x1="2.27cm" svg:y1="36.242cm" svg:x2="20.367cm" svg:y2="36.242cm">
          <text:p/>
        </draw:line>
        <draw:frame draw:style-name="gr4" draw:text-style-name="P1" draw:layer="layout" svg:width="12.7cm" svg:height="1.27cm" svg:x="26.082cm" svg:y="24.494cm">
          <draw:text-box>
            <text:p>The first 3-4 top skills, the rest in any order.</text:p>
          </draw:text-box>
        </draw:frame>
        <draw:custom-shape draw:style-name="gr17" draw:text-style-name="P2" draw:layer="layout" svg:width="19.085cm" svg:height="13.017cm" svg:x="1.6cm" svg:y="1.635cm">
          <text:p/>
          <draw:enhanced-geometry svg:viewBox="0 0 21600 21600" draw:path-stretchpoint-x="10800" draw:path-stretchpoint-y="10800" draw:text-areas="?f3 ?f4 ?f5 ?f6" draw:type="round-rectangle" draw:modifiers="741.6807497311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draw:layer="layout" svg:width="19.05cm" svg:height="5.362cm" svg:x="1.635cm" svg:y="1.57cm">
          <text:p text:style-name="P13">Header img</text:p>
          <draw:enhanced-geometry svg:viewBox="0 0 21600 21600" draw:path-stretchpoint-x="10800" draw:path-stretchpoint-y="10800" draw:text-areas="?f3 ?f4 ?f5 ?f6" draw:type="round-rectangle" draw:modifiers="2336.842105263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6" draw:layer="layout" svg:width="6.667cm" svg:height="2.858cm" svg:x="2.27cm" svg:y="8.937cm">
          <draw:text-box>
            <text:p text:style-name="P5"><text:span text:style-name="T7">Full name</text:span></text:p>
            <text:p text:style-name="P5">Job title</text:p>
            <text:p text:style-name="P5"><text:span text:style-name="T8">Location . Contact info</text:span></text:p>
          </draw:text-box>
        </draw:frame>
        <draw:frame draw:style-name="gr20" draw:text-style-name="P1" draw:layer="layout" svg:width="6.668cm" svg:height="2.222cm" svg:x="10.207cm" svg:y="9.255cm">
          <draw:text-box>
            <text:p/>
          </draw:text-box>
        </draw:frame>
        <draw:frame draw:style-name="gr21" draw:text-style-name="P15" draw:layer="layout" svg:width="10.796cm" svg:height="3.399cm" svg:x="9.571cm" svg:y="8.937cm">
          <draw:text-box>
            <text:p text:style-name="P5"><text:span text:style-name="T9">Icon <text:s/></text:span><text:span text:style-name="T10">Company name</text:span></text:p>
            <text:p text:style-name="P5"><text:span text:style-name="T9">Icon </text:span><text:span text:style-name="T10">Latest academic degree</text:span></text:p>
            <text:p text:style-name="P5"><text:span text:style-name="T9">Icon </text:span><text:span text:style-name="T10">Github page / domain</text:span></text:p>
          </draw:text-box>
        </draw:frame>
        <draw:custom-shape draw:style-name="gr22" draw:text-style-name="P17" draw:layer="layout" svg:width="6.668cm" svg:height="1.27cm" svg:x="2.587cm" svg:y="12.747cm">
          <text:p text:style-name="P16"><text:span text:style-name="T11">butto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5.397cm" svg:height="1.27cm" svg:x="2.27cm" svg:y="37.195cm">
          <draw:text-box>
            <text:p>Education</text:p>
          </draw:text-box>
        </draw:frame>
        <draw:frame draw:style-name="gr23" draw:text-style-name="P1" draw:layer="layout" svg:width="3.175cm" svg:height="1.587cm" svg:x="2.587cm" svg:y="39.1cm">
          <draw:text-box>
            <text:p><text:span text:style-name="T12">icon</text:span></text:p>
          </draw:text-box>
        </draw:frame>
        <draw:frame draw:style-name="gr24" draw:text-style-name="P1" draw:layer="layout" svg:width="10.795cm" svg:height="3.493cm" svg:x="7.032cm" svg:y="38.782cm">
          <draw:text-box>
            <text:p text:style-name="P5"><text:span text:style-name="T10">academic degree</text:span></text:p>
            <text:p text:style-name="P5"><text:span text:style-name="T10">Degree -Title of</text:span></text:p>
            <text:p text:style-name="P5"><text:span text:style-name="T10"><text:s/></text:span><text:span text:style-name="T10">Year - year</text:span></text:p>
          </draw:text-box>
        </draw:frame>
        <draw:line draw:style-name="gr10" draw:text-style-name="P4" draw:layer="layout" svg:x1="2.271cm" svg:y1="42.542cm" svg:x2="20.368cm" svg:y2="42.542cm">
          <text:p/>
        </draw:line>
        <draw:frame draw:style-name="gr9" draw:text-style-name="P1" draw:layer="layout" svg:width="6.35cm" svg:height="1.905cm" svg:x="2.587cm" svg:y="43.227cm">
          <draw:text-box>
            <text:p>Languages</text:p>
          </draw:text-box>
        </draw:frame>
        <draw:frame draw:style-name="gr25" draw:text-style-name="P1" draw:layer="layout" svg:width="16.51cm" svg:height="8.89cm" svg:x="2.587cm" svg:y="44.497cm">
          <draw:text-box>
            <text:p>Azerbaijan</text:p>
            <text:p>Native or bilingual proficiency</text:p>
            <text:p/>
            <text:p>Persian</text:p>
            <text:p>Native or bilingual proficiency</text:p>
            <text:p/>
            <text:p>English</text:p>
            <text:p>Elementary proficiency</text:p>
            <text:p/>
            <text:p>Turkish</text:p>
            <text:p>Elementary proficiency</text:p>
          </draw:text-box>
        </draw:frame>
        <draw:line draw:style-name="gr7" draw:text-style-name="P4" draw:layer="layout" svg:x1="20.367cm" svg:y1="1.952cm" svg:x2="1.952cm" svg:y2="6.715cm">
          <text:p/>
        </draw:line>
        <draw:line draw:style-name="gr7" draw:text-style-name="P4" draw:layer="layout" svg:x1="1.635cm" svg:y1="1.952cm" svg:x2="20.367cm" svg:y2="6.715cm">
          <text:p/>
        </draw:line>
        <draw:custom-shape draw:style-name="gr26" draw:text-style-name="P2" draw:layer="layout" svg:width="3.81cm" svg:height="3.81cm" svg:x="2.27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4" draw:layer="layout" svg:width="3.175cm" svg:height="3.175cm" svg:x="2.587cm" svg:y="5.144cm">
          <text:p text:style-name="P13">Profile</text:p>
          <text:p text:style-name="P13">im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5.127cm" svg:y1="5.762cm" svg:x2="3.222cm" svg:y2="7.667cm">
          <text:p/>
        </draw:line>
        <draw:line draw:style-name="gr7" draw:text-style-name="P4" draw:layer="layout" svg:x1="2.905cm" svg:y1="5.762cm" svg:x2="5.127cm" svg:y2="7.667cm">
          <text:p/>
        </draw:line>
        <draw:custom-shape draw:style-name="gr28" draw:text-style-name="P2" draw:layer="layout" svg:width="0.953cm" svg:height="53.34cm" svg:x="21.002cm" svg:y="1.63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0.635cm" svg:height="11.113cm" svg:x="21.14cm" svg:y="1.952cm">
          <text:p/>
          <draw:enhanced-geometry svg:viewBox="0 0 21600 21600" draw:type="rectangle" draw:enhanced-path="M 0 0 L 21600 0 21600 21600 0 21600 0 0 Z N"/>
        </draw:custom-shape>
        <draw:line draw:style-name="gr30" draw:text-style-name="P19" draw:layer="layout" svg:x1="19.732cm" svg:y1="21.32cm" svg:x2="24.495cm" svg:y2="21.32cm">
          <text:p text:style-name="P18"><text:span text:style-name="T13">MODAL</text:span></text:p>
        </draw:line>
        <draw:custom-shape draw:style-name="gr31" draw:text-style-name="P14" draw:layer="layout" svg:width="1.905cm" svg:height="0.635cm" svg:x="16.24cm" svg:y="13.382cm">
          <text:p text:style-name="P13">EN</text:p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0.635cm" svg:height="0.635cm" svg:x="18.145cm" svg:y="13.382cm">
          <text:p text:style-name="P20">˅</text:p>
          <draw:enhanced-geometry svg:viewBox="0 0 21600 21600" draw:type="rectangle" draw:enhanced-path="M 0 0 L 21600 0 21600 21600 0 21600 0 0 Z N"/>
        </draw:custom-shape>
        <draw:line draw:style-name="gr33" draw:text-style-name="P4" xml:id="id1" draw:id="id1" draw:layer="layout" svg:x1="4.81cm" svg:y1="11.16cm" svg:x2="8.62cm" svg:y2="11.16cm">
          <text:p/>
        </draw:line>
        <draw:connector draw:style-name="gr34" draw:text-style-name="P4" draw:layer="layout" draw:line-skew="-7.625cm" svg:x1="8.62cm" svg:y1="11.16cm" svg:x2="25.444cm" svg:y2="14.354cm" draw:start-shape="id1" draw:start-glue-point="1" svg:d="M8620 11160h1037v3194h15787" svg:viewBox="0 0 16825 3195">
          <text:p/>
        </draw:connector>
        <draw:frame draw:style-name="gr35" draw:text-style-name="P22" draw:layer="layout" svg:width="3.175cm" svg:height="0.962cm" svg:x="21.955cm" svg:y="13.888cm">
          <draw:text-box>
            <text:p text:style-name="P21"><text:span text:style-name="T13">MOD</text:span><text:span text:style-name="T13">AL</text:span></text:p>
          </draw:text-box>
        </draw:frame>
        <draw:custom-shape draw:style-name="gr36" draw:text-style-name="P2" draw:layer="layout" svg:width="13.017cm" svg:height="7.62cm" svg:x="25.765cm" svg:y="10.5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95.6484397366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4" draw:layer="layout" svg:x1="26.082cm" svg:y1="12.468cm" svg:x2="38.465cm" svg:y2="12.43cm">
          <text:p/>
        </draw:line>
        <draw:frame draw:style-name="gr37" draw:text-style-name="P6" draw:layer="layout" svg:width="12.7cm" svg:height="1.673cm" svg:x="26.4cm" svg:y="10.96cm">
          <draw:text-box>
            <text:p text:style-name="P5">Contact info<text:tab/><text:tab/><text:tab/> <text:s text:c="23"/><text:tab/>X</text:p>
          </draw:text-box>
        </draw:frame>
        <draw:custom-shape draw:style-name="gr11" draw:text-style-name="P2" draw:layer="layout" svg:width="0.634cm" svg:height="4.445cm" svg:x="37.83cm" svg:y="12.74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35cm" svg:height="2.54cm" svg:x="37.886cm" svg:y="12.747cm">
          <text:p/>
          <draw:enhanced-geometry svg:viewBox="0 0 21600 21600" draw:type="rectangle" draw:enhanced-path="M 0 0 L 21600 0 21600 21600 0 21600 0 0 Z N"/>
        </draw:custom-shape>
        <draw:frame draw:style-name="gr38" draw:text-style-name="P23" draw:layer="layout" svg:width="10.477cm" svg:height="4.445cm" svg:x="26.4cm" svg:y="13.065cm">
          <draw:text-box>
            <text:p>Icon your profile</text:p>
            <text:p><text:tab/>url</text:p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Vazirmatn" svg:font-family="Vazirmatn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Vazirmatn" style:font-family-complex="Vazirmatn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6-07-19T18:03:08.569287875</meta:creation-date>
    <dc:date>2026-07-21T23:22:57.727836625</dc:date>
    <meta:editing-duration>PT43M51S</meta:editing-duration>
    <meta:editing-cycles>12</meta:editing-cycles>
    <meta:generator>LibreOffice/7.1.4.2$Linux_X86_64 LibreOffice_project/a529a4fab45b75fefc5b6226684193eb000654f6</meta:generator>
    <meta:document-statistic meta:object-count="53"/>
  </office:meta>
</office:document-meta>
</file>